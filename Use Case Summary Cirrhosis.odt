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ing_20_3">
      <style:text-properties style:font-name="Times New Roman" fo:font-size="12pt" fo:font-weight="normal" officeooo:rsid="0015a450" officeooo:paragraph-rsid="0015a450" style:font-size-asian="12pt" style:font-weight-asian="normal" style:font-size-complex="12pt" style:font-weight-complex="normal"/>
    </style:style>
    <style:style style:name="P2" style:family="paragraph" style:parent-style-name="Text_20_body">
      <style:text-properties style:font-name="Times New Roman" fo:font-size="12pt" fo:font-weight="normal" officeooo:rsid="0015a450" officeooo:paragraph-rsid="0015a450" style:font-size-asian="12pt" style:font-weight-asian="normal" style:font-size-complex="12pt" style:font-weight-complex="normal"/>
    </style:style>
    <style:style style:name="P3" style:family="paragraph" style:parent-style-name="Text_20_body">
      <style:text-properties style:font-name="Times New Roman" officeooo:rsid="0015a450" officeooo:paragraph-rsid="0015a450"/>
    </style:style>
    <style:style style:name="P4" style:family="paragraph" style:parent-style-name="Heading_20_3">
      <style:paragraph-properties fo:text-align="center" style:justify-single-word="false"/>
      <style:text-properties style:font-name="Times New Roman" officeooo:rsid="0015a450" officeooo:paragraph-rsid="0015a450"/>
    </style:style>
    <style:style style:name="P5" style:family="paragraph" style:parent-style-name="Heading_20_3">
      <style:text-properties style:font-name="Times New Roman" fo:font-size="12pt" style:font-size-asian="12pt" style:font-size-complex="12pt"/>
    </style:style>
    <style:style style:name="P6" style:family="paragraph" style:parent-style-name="Text_20_body" style:list-style-name="L1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Times New Roman" fo:font-size="12pt" style:font-size-asian="12pt" style:font-size-complex="12pt"/>
    </style:style>
    <style:style style:name="T1" style:family="text">
      <style:text-properties fo:font-weight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Karl Wise</text:h>
      <text:p text:style-name="P2">AI Engineering/Machine Learning Training</text:p>
      <text:p text:style-name="P2">Jaime Ruiz</text:p>
      <text:p text:style-name="P2">5/26/26</text:p>
      <text:p text:style-name="P3"/>
      <text:h text:style-name="P4" text:outline-level="3">Use Case Summary: Liver Cirrhosis Predictions</text:h>
      <text:h text:style-name="P5" text:outline-level="3">Use Case Summary</text:h>
      <text:list text:style-name="L1">
        <text:list-item>
          <text:p text:style-name="P6"><text:span text:style-name="T1">Industry &amp; Domain:</text:span> Clinical Decision Support Systems (CDSS) built to evaluate liver function data and accurately track high-risk patient survival trajectories.</text:p>
        </text:list-item>
        <text:list-item>
          <text:p text:style-name="P6"><text:span text:style-name="T1">The Core Challenge:</text:span> Developing a binary classification engine ("Stable" vs. "Deceased") using the limited Mayo Clinic PBC dataset (312 records) without causing the model to overfit or memorize noise.</text:p>
        </text:list-item>
        <text:list-item>
          <text:p text:style-name="P6"><text:span text:style-name="T1">The Benchmark Stack:</text:span> A direct, head-to-head comparison evaluating a custom NumPy-built linear baseline (MVLR) against both a custom NumPy ANN (using standard SGD over 60,000 epochs) and a production-grade TensorFlow/Keras pipeline (using the adaptive Adam optimizer).</text:p>
        </text:list-item>
        <text:list-item>
          <text:p text:style-name="P6"><text:span text:style-name="T1">Key Finding (Occam's Razor):</text:span> The simpler linear baseline (MVLR) outperformed both deep networks, securing the highest overall validation accuracy at 85.71% and minimizing critical clinical misses (false negatives).</text:p>
        </text:list-item>
        <text:list-item>
          <text:p text:style-name="P6"><text:span text:style-name="T1">Next Steps for Production:</text:span> Transitioning from a static 80/20 train-test split to a Stratified $K$-Fold Cross-Validation framework (K=5 or 10) to eliminate "data luck," stabilize variance, and ensure robust, balanced evaluation across all fold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27T12:40:33.404394900</meta:creation-date>
    <dc:date>2026-05-27T12:44:13.307448300</dc:date>
    <meta:editing-duration>PT3M41S</meta:editing-duration>
    <meta:editing-cycles>1</meta:editing-cycles>
    <meta:document-statistic meta:table-count="0" meta:image-count="0" meta:object-count="0" meta:page-count="1" meta:paragraph-count="11" meta:word-count="171" meta:character-count="1215" meta:non-whitespace-character-count="1060"/>
    <meta:generator>LibreOffice/26.2.3.2$Windows_X86_64 LibreOffice_project/70e089b17412e4cb7773e41413306b17a2328c34</meta:generator>
  </office:meta>
</office:document-meta>
</file>